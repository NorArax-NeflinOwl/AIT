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2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26"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4"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3"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0"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3" style:family="table-cell" style:parent-style-name="Default">
      <style:table-cell-properties style:cell-protect="protected formula-hidden" style:print-content="true" fo:wrap-option="wrap"/>
      <style:text-properties fo:color="#ffffff"/>
    </style:style>
    <style:style style:name="ce304"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3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319"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1"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48"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4"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399"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0"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4"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17"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0" style:family="table-cell" style:parent-style-name="Default">
      <style:table-cell-properties style:cell-protect="hidden-and-protected" style:print-content="true" fo:wrap-option="wrap"/>
      <style:text-properties fo:color="#cccccc"/>
    </style:style>
    <style:style style:name="ce431"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2"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4"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25" office:value-type="string" calcext:value-type="string" table:number-columns-spanned="3" table:number-rows-spanned="3">
            <text:p>FAKTURA VAT</text:p>
          </table:table-cell>
          <table:covered-table-cell table:number-columns-repeated="2" table:style-name="ce125"/>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25"/>
          <table:table-cell table:style-name="ce67"/>
          <table:table-cell/>
          <table:table-cell table:style-name="ce79" table:formula="of:=[calc.N1]" office:value-type="date" office:date-value="2019-08-30" calcext:value-type="date" table:number-columns-spanned="3" table:number-rows-spanned="1">
            <text:p>30.08.2019</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8/2019" calcext:value-type="string" table:number-columns-spanned="3" table:number-rows-spanned="3">
            <text:p>NR 01/08/2019</text:p>
          </table:table-cell>
          <table:covered-table-cell table:style-name="ce183"/>
          <table:covered-table-cell table:style-name="ce59"/>
          <table:table-cell table:style-name="ce68"/>
          <table:table-cell/>
          <table:table-cell table:style-name="ce79" table:formula="of:=[.L4]" office:value-type="date" office:date-value="2019-08-30" calcext:value-type="date" table:number-columns-spanned="3" table:number-rows-spanned="1">
            <text:p>30.08.2019</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157"/>
          <table:table-cell table:style-name="ce69"/>
          <table:table-cell table:style-name="ce70"/>
          <table:table-cell table:style-name="ce80"/>
          <table:table-cell table:style-name="ce52"/>
          <table:table-cell table:style-name="ce283"/>
          <table:table-cell table:number-columns-repeated="1010"/>
        </table:table-row>
        <table:table-row table:style-name="ro9">
          <table:table-cell/>
          <table:table-cell table:style-name="ce21" table:number-columns-repeated="4"/>
          <table:table-cell/>
          <table:covered-table-cell table:number-columns-repeated="3" table:style-name="ce183"/>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183" table:number-columns-repeated="3"/>
          <table:table-cell table:style-name="ce68"/>
          <table:table-cell/>
          <table:table-cell table:style-name="ce82" table:formula="of:=Miasto" office:value-type="string" office:string-value="Lublin" calcext:value-type="string" table:number-columns-spanned="3" table:number-rows-spanned="1">
            <text:p>Lublin</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Patryk Pudwel&#10;Sielankowa 18/1&#10;20-802 Lublin" calcext:value-type="string" table:number-columns-spanned="6" table:number-rows-spanned="3">
            <text:p>Patryk Pudwel</text:p>
            <text:p>Sielankowa 18/1</text:p>
            <text:p>20-802 Lublin</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0"/>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7123385604" calcext:value-type="string" table:number-columns-spanned="3" table:number-rows-spanned="1">
            <text:p>NIP: 7123385604</text:p>
          </table:table-cell>
          <table:covered-table-cell table:number-columns-repeated="2" table:style-name="ce26"/>
          <table:table-cell table:style-name="ce26" table:formula="of:=RegonSprzedawcy" office:value-type="string" office:string-value="REGON: 383113428" calcext:value-type="string" table:number-columns-spanned="3" table:number-rows-spanned="1">
            <text:p>REGON: 383113428</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08" office:value-type="string" calcext:value-type="string" table:number-columns-spanned="2" table:number-rows-spanned="1">
            <text:p>Cena jednostkowa netto</text:p>
          </table:table-cell>
          <table:covered-table-cell table:style-name="ce208"/>
          <table:table-cell table:style-name="ce251" office:value-type="string" calcext:value-type="string" table:number-columns-spanned="2" table:number-rows-spanned="1">
            <text:p>Wartość towaru/usługi netto</text:p>
          </table:table-cell>
          <table:covered-table-cell table:style-name="ce251"/>
          <table:table-cell table:style-name="ce251" office:value-type="string" calcext:value-type="string">
            <text:p>VAT %</text:p>
          </table:table-cell>
          <table:table-cell table:style-name="ce251" office:value-type="string" calcext:value-type="string">
            <text:p>Kwota podatku</text:p>
          </table:table-cell>
          <table:table-cell table:style-name="ce251" office:value-type="string" calcext:value-type="string" table:number-columns-spanned="2" table:number-rows-spanned="1">
            <text:p>Wartość towaru/usługi brutto</text:p>
          </table:table-cell>
          <table:covered-table-cell table:style-name="ce251"/>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sierpniu zgodnie&#10;z umową nr ISD19/1148 oraz przeniesienie wszystkich autorskich praw majątkowych wraz&#10;z prawem do udzielenia zezwolenia&#10;na wykonywanie praw pokrewnych wynikających&#10;ze świadczenia usług&#10;w m-cu sierpniu jak w umowie" calcext:value-type="string" table:number-columns-spanned="3" table:number-rows-spanned="1">
            <text:p>Za świadczenie usług</text:p>
            <text:p>w m-cu sierpniu zgodnie</text:p>
            <text:p>z umową nr ISD19/1148 oraz przeniesienie wszystkich autorskich praw majątkowych wraz</text:p>
            <text:p>z prawem do udzielenia zezwolenia</text:p>
            <text:p>na wykonywanie praw pokrewnych wynikających</text:p>
            <text:p>ze świadczenia usług</text:p>
            <text:p>w m-cu sierpni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09" table:formula="of:=Kontrakt" office:value-type="float" office:value="2400" calcext:value-type="float" table:number-columns-spanned="2" table:number-rows-spanned="1">
            <text:p>2400.00</text:p>
          </table:table-cell>
          <table:covered-table-cell table:style-name="ce58"/>
          <table:table-cell table:style-name="ce62" table:formula="of:=[.F20]*[.G20]" office:value-type="float" office:value="2400" calcext:value-type="float" table:number-columns-spanned="2" table:number-rows-spanned="1">
            <text:p>2400.00</text:p>
          </table:table-cell>
          <table:covered-table-cell table:style-name="ce62"/>
          <table:table-cell table:style-name="ce71" office:value-type="float" office:value="23" calcext:value-type="float">
            <text:p>23</text:p>
          </table:table-cell>
          <table:table-cell table:style-name="ce209" table:formula="of:=[.I20]*[.K20]/100" office:value-type="float" office:value="552" calcext:value-type="float">
            <text:p>552.00</text:p>
          </table:table-cell>
          <table:table-cell table:style-name="ce209" table:formula="of:=[.I20]+[.L20]" office:value-type="float" office:value="2952" calcext:value-type="float" table:number-columns-spanned="2" table:number-rows-spanned="1">
            <text:p>2952.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84 godz. usług świadczonych w miesiącu sierpniu." calcext:value-type="string" table:number-columns-spanned="13" table:number-rows-spanned="1">
            <text:p>Powyższe rozliczenie dotyczy 84 godz. usług świadczonych w miesiącu sierpni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26" office:value-type="string" calcext:value-type="string" table:number-columns-spanned="2" table:number-rows-spanned="1">
            <text:p>RAZEM:</text:p>
          </table:table-cell>
          <table:covered-table-cell table:style-name="ce226"/>
          <table:table-cell table:style-name="ce63" table:formula="of:=SUM([.I20:.J21])" office:value-type="float" office:value="2400" calcext:value-type="float" table:number-columns-spanned="2" table:number-rows-spanned="1">
            <text:p>2400.00</text:p>
          </table:table-cell>
          <table:covered-table-cell table:style-name="ce63"/>
          <table:table-cell table:style-name="ce72"/>
          <table:table-cell table:style-name="ce63" table:formula="of:=SUM([.L20:.L21])" office:value-type="float" office:value="552" calcext:value-type="float" table:number-columns-spanned="2" table:number-rows-spanned="1">
            <text:p>552.00</text:p>
          </table:table-cell>
          <table:covered-table-cell table:style-name="ce63"/>
          <table:table-cell table:style-name="ce96" table:formula="of:=SUM([.M20:.N21])" office:value-type="float" office:value="2952" calcext:value-type="float">
            <text:p>2952.00</text:p>
          </table:table-cell>
          <table:table-cell table:number-columns-repeated="1010"/>
        </table:table-row>
        <table:table-row table:style-name="ro17">
          <table:table-cell table:number-columns-repeated="8"/>
          <table:table-cell table:style-name="ce63" table:formula="of:=[.I27]" office:value-type="float" office:value="2400" calcext:value-type="float" table:number-columns-spanned="2" table:number-rows-spanned="1">
            <text:p>2400.00</text:p>
          </table:table-cell>
          <table:covered-table-cell table:style-name="ce63"/>
          <table:table-cell table:style-name="ce73" office:value-type="percentage" office:value="0.23" calcext:value-type="percentage">
            <text:p>23%</text:p>
          </table:table-cell>
          <table:table-cell table:style-name="ce63" table:formula="of:=[.L27]" office:value-type="float" office:value="552" calcext:value-type="float" table:number-columns-spanned="2" table:number-rows-spanned="1">
            <text:p>552.00</text:p>
          </table:table-cell>
          <table:covered-table-cell table:style-name="ce63"/>
          <table:table-cell table:style-name="ce96" table:formula="of:=[.N27]" office:value-type="float" office:value="2952" calcext:value-type="float">
            <text:p>2952.00</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2952" calcext:value-type="float" table:number-columns-spanned="3" table:number-rows-spanned="2">
            <text:p>2952.00</text:p>
          </table:table-cell>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1">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dwa tysiące dziewięćset pięćdziesiąt dwa złote zero gr." calcext:value-type="string" table:number-columns-spanned="6" table:number-rows-spanned="3">
            <text:p>dwa tysiące dziewięćset pięćdziesiąt dwa złote zero gr.</text:p>
          </table:table-cell>
          <table:covered-table-cell table:number-columns-repeated="4" table:style-name="ce64"/>
          <table:covered-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string" office:string-value="63 1140 2004 0000 3702 7842" calcext:value-type="string" table:number-columns-spanned="8" table:number-rows-spanned="1">
            <text:p>63 1140 2004 0000 3702 7842</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39" table:number-columns-spanned="3" table:number-rows-spanned="3"/>
          <table:covered-table-cell table:number-columns-repeated="2" table:style-name="ce239"/>
          <table:table-cell table:style-name="ce67"/>
          <table:table-cell/>
          <table:table-cell table:style-name="ce46" table:number-columns-spanned="3" table:number-rows-spanned="1"/>
          <table:covered-table-cell table:style-name="ce52"/>
          <table:covered-table-cell table:style-name="ce283"/>
          <table:table-cell table:number-columns-repeated="1010"/>
        </table:table-row>
        <table:table-row table:style-name="ro22">
          <table:table-cell/>
          <table:covered-table-cell table:number-columns-repeated="4" table:style-name="ce21"/>
          <table:table-cell/>
          <table:covered-table-cell table:number-columns-repeated="3" table:style-name="ce239"/>
          <table:table-cell table:style-name="ce67"/>
          <table:table-cell/>
          <table:table-cell table:style-name="ce84"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0"/>
          <table:table-cell table:style-name="ce183" table:number-columns-repeated="2"/>
          <table:table-cell table:style-name="ce68"/>
          <table:table-cell/>
          <table:table-cell table:style-name="ce46"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table-cell table:style-name="ce240" table:number-columns-spanned="3" table:number-rows-spanned="3"/>
          <table:covered-table-cell table:number-columns-repeated="2" table:style-name="ce183"/>
          <table:table-cell table:style-name="ce68"/>
          <table:table-cell/>
          <table:table-cell table:style-name="ce84" table:number-columns-spanned="3" table:number-rows-spanned="1"/>
          <table:covered-table-cell table:style-name="ce52"/>
          <table:covered-table-cell table:style-name="ce283"/>
          <table:table-cell table:number-columns-repeated="1010"/>
        </table:table-row>
        <table:table-row table:style-name="ro21">
          <table:table-cell/>
          <table:table-cell table:style-name="ce21" table:number-columns-repeated="4"/>
          <table:table-cell/>
          <table:covered-table-cell table:number-columns-repeated="3" table:style-name="ce183"/>
          <table:table-cell table:style-name="ce69"/>
          <table:table-cell table:style-name="ce70"/>
          <table:table-cell table:style-name="ce80"/>
          <table:table-cell table:style-name="ce52"/>
          <table:table-cell table:style-name="ce283"/>
          <table:table-cell table:number-columns-repeated="1010"/>
        </table:table-row>
        <table:table-row table:style-name="ro24">
          <table:table-cell/>
          <table:table-cell table:style-name="ce21" table:number-columns-repeated="4"/>
          <table:table-cell/>
          <table:covered-table-cell table:number-columns-repeated="3" table:style-name="ce183"/>
          <table:table-cell table:style-name="ce69"/>
          <table:table-cell/>
          <table:table-cell table:style-name="ce85" table:number-columns-spanned="3" table:number-rows-spanned="1"/>
          <table:covered-table-cell table:style-name="ce52"/>
          <table:covered-table-cell table:style-name="ce283"/>
          <table:table-cell table:number-columns-repeated="1010"/>
        </table:table-row>
        <table:table-row table:style-name="ro2">
          <table:table-cell table:number-columns-repeated="6"/>
          <table:table-cell table:style-name="ce183" table:number-columns-repeated="3"/>
          <table:table-cell table:style-name="ce68"/>
          <table:table-cell/>
          <table:table-cell table:style-name="ce86"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5"/>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1" table:number-columns-spanned="2" table:number-rows-spanned="1"/>
          <table:covered-table-cell table:style-name="ce241"/>
          <table:table-cell table:style-name="ce241" table:number-columns-spanned="2" table:number-rows-spanned="1"/>
          <table:covered-table-cell table:style-name="ce241"/>
          <table:table-cell table:style-name="ce241" table:number-columns-repeated="2"/>
          <table:table-cell table:style-name="ce241" table:number-columns-spanned="2" table:number-rows-spanned="1"/>
          <table:covered-table-cell table:style-name="ce241"/>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6" table:number-columns-spanned="2" table:number-rows-spanned="1"/>
          <table:covered-table-cell table:style-name="ce256"/>
          <table:table-cell table:style-name="ce77"/>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office:forms form:automatic-focus="false" form:apply-design-mode="fals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0" table:number-columns-repeated="2"/>
          <table:table-cell table:style-name="ce116" office:value-type="string" calcext:value-type="string" table:number-columns-spanned="5" table:number-rows-spanned="2">
            <text:p>Przeniesienie Praw</text:p>
          </table:table-cell>
          <table:covered-table-cell table:number-columns-repeated="4" table:style-name="ce300"/>
          <table:table-cell table:style-name="ce300" table:number-columns-repeated="2"/>
          <table:table-cell table:number-columns-repeated="1015"/>
        </table:table-row>
        <table:table-row table:style-name="ro2">
          <table:table-cell table:style-name="ce300" table:number-columns-repeated="2"/>
          <table:covered-table-cell table:number-columns-repeated="5" table:style-name="ce300"/>
          <table:table-cell table:style-name="ce300" table:number-columns-repeated="2"/>
          <table:table-cell table:number-columns-repeated="1015"/>
        </table:table-row>
        <table:table-row table:style-name="ro2">
          <table:table-cell table:style-name="ce300"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0"/>
          <table:table-cell table:style-name="ce132" table:formula="of:=CONCATENATE(Miasto;&quot;, &quot; ;[calc.W1])" office:value-type="string" office:string-value="Lublin, 31.08.2019" calcext:value-type="string" table:number-columns-spanned="4" table:number-rows-spanned="4">
            <text:p>Lublin, 31.08.2019</text:p>
          </table:table-cell>
          <table:covered-table-cell table:number-columns-repeated="2" table:style-name="ce300"/>
          <table:covered-table-cell/>
          <table:table-cell/>
          <table:table-cell table:style-name="ce136"/>
          <table:table-cell table:number-columns-repeated="1012"/>
        </table:table-row>
        <table:table-row table:style-name="ro26">
          <table:table-cell table:style-name="ce300" table:number-columns-repeated="3"/>
          <table:covered-table-cell table:number-columns-repeated="3" table:style-name="ce300"/>
          <table:covered-table-cell table:style-name="ce133"/>
          <table:covered-table-cell table:style-name="ce316"/>
          <table:covered-table-cell table:style-name="ce300"/>
          <table:covered-table-cell/>
          <table:table-cell table:number-columns-repeated="1014"/>
        </table:table-row>
        <table:table-row table:style-name="ro29">
          <table:table-cell table:style-name="ce300" table:number-columns-repeated="6"/>
          <table:covered-table-cell table:number-columns-repeated="3" table:style-name="ce300"/>
          <table:covered-table-cell/>
          <table:table-cell table:number-columns-repeated="1014"/>
        </table:table-row>
        <table:table-row table:style-name="ro31">
          <table:table-cell table:style-name="ce300" table:number-columns-repeated="6"/>
          <table:covered-table-cell table:number-columns-repeated="3" table:style-name="ce300"/>
          <table:covered-table-cell/>
          <table:table-cell table:number-columns-repeated="1014"/>
        </table:table-row>
        <table:table-row table:style-name="ro13">
          <table:table-cell table:style-name="ce300" table:number-columns-repeated="2"/>
          <table:table-cell table:style-name="ce117" table:formula="of:=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1"/>
          <table:covered-table-cell table:number-columns-repeated="2"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3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5">
          <table:table-cell table:style-name="ce300" table:number-columns-repeated="9"/>
          <table:table-cell table:number-columns-repeated="1015"/>
        </table:table-row>
        <table:table-row table:style-name="ro2">
          <table:table-cell table:style-name="ce300" table:number-columns-repeated="4"/>
          <table:table-cell table:style-name="ce123" office:value-type="string" calcext:value-type="string" table:number-columns-spanned="2" table:number-rows-spanned="1">
            <text:p>Do:</text:p>
          </table:table-cell>
          <table:covered-table-cell table:style-name="ce300"/>
          <table:table-cell table:style-name="ce300" table:number-columns-repeated="3"/>
          <table:table-cell table:number-columns-repeated="1015"/>
        </table:table-row>
        <table:table-row table:style-name="ro2">
          <table:table-cell table:style-name="ce300"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4">
          <table:table-cell table:style-name="ce300" table:number-columns-repeated="4"/>
          <table:covered-table-cell table:number-columns-repeated="5" table:style-name="ce300"/>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316" table:formula="of:=[calc.B7]" office:value-type="string" office:string-value="Patryk Pudwel" calcext:value-type="string" table:number-columns-spanned="6" table:number-rows-spanned="1">
            <text:p>Patryk Pudwel</text:p>
          </table:table-cell>
          <table:covered-table-cell table:style-name="ce316"/>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table-cell table:style-name="ce303" table:number-columns-repeated="10"/>
          <table:table-cell table:number-columns-repeated="1014"/>
        </table:table-row>
        <table:table-row table:style-name="ro2">
          <table:table-cell table:style-name="ce304" table:number-columns-repeated="2"/>
          <table:table-cell table:style-name="ce118" office:value-type="string" calcext:value-type="string" table:number-columns-spanned="5" table:number-rows-spanned="2">
            <text:p>Transfer of rights</text:p>
          </table:table-cell>
          <table:covered-table-cell table:number-columns-repeated="4"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2"/>
          <table:covered-table-cell table:number-columns-repeated="5"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6"/>
          <table:table-cell table:style-name="ce134" table:formula="of:=CONCATENATE(Miasto;&quot;, &quot; ;[calc.W2])" office:value-type="string" office:string-value="Lublin, 08/31/2019" calcext:value-type="string" table:number-columns-spanned="4" table:number-rows-spanned="2">
            <text:p>Lublin, 08/31/2019</text:p>
          </table:table-cell>
          <table:covered-table-cell table:number-columns-repeated="2" table:style-name="ce304"/>
          <table:covered-table-cell table:style-name="ce303"/>
          <table:table-cell table:style-name="ce69" table:number-columns-repeated="1014"/>
        </table:table-row>
        <table:table-row table:style-name="ro34">
          <table:table-cell table:style-name="ce304" table:number-columns-repeated="6"/>
          <table:covered-table-cell table:style-name="ce135" table:formula="of:=CONCATENATE(Miasto;&quot;, &quot; ;[calc.W2])" office:value-type="string" office:string-value="Lublin, 08/31/2019" calcext:value-type="string">
            <text:p>Lublin, 08/31/2019</text:p>
          </table:covered-table-cell>
          <table:covered-table-cell table:style-name="ce319"/>
          <table:covered-table-cell table:style-name="ce304"/>
          <table:covered-table-cell table:style-name="ce303"/>
          <table:table-cell table:style-name="ce69" table:number-columns-repeated="1014"/>
        </table:table-row>
        <table:table-row table:style-name="ro35">
          <table:table-cell table:style-name="ce304" table:number-columns-repeated="9"/>
          <table:table-cell table:style-name="ce303"/>
          <table:table-cell table:style-name="ce69" table:number-columns-repeated="1014"/>
        </table:table-row>
        <table:table-row table:style-name="ro11">
          <table:table-cell table:style-name="ce304" table:number-columns-repeated="9"/>
          <table:table-cell table:style-name="ce303"/>
          <table:table-cell table:style-name="ce69" table:number-columns-repeated="1014"/>
        </table:table-row>
        <table:table-row table:style-name="ro36">
          <table:table-cell table:style-name="ce304" table:number-columns-repeated="2"/>
          <table:table-cell table:style-name="ce119" table:formula="of:= 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2"/>
          <table:covered-table-cell table:number-columns-repeated="2"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6">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37">
          <table:table-cell table:style-name="ce304" table:number-columns-repeated="9"/>
          <table:table-cell table:style-name="ce303"/>
          <table:table-cell table:style-name="ce69" table:number-columns-repeated="1014"/>
        </table:table-row>
        <table:table-row table:style-name="ro2">
          <table:table-cell table:style-name="ce304" table:number-columns-repeated="4"/>
          <table:table-cell table:style-name="ce126" office:value-type="string" calcext:value-type="string">
            <text:p>To:</text:p>
          </table:table-cell>
          <table:table-cell table:style-name="ce304" table:number-columns-repeated="4"/>
          <table:table-cell table:style-name="ce303"/>
          <table:table-cell table:style-name="ce69" table:number-columns-repeated="1014"/>
        </table:table-row>
        <table:table-row table:style-name="ro2">
          <table:table-cell table:style-name="ce304"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38">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39">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number-rows-repeated="3">
          <table:table-cell table:style-name="ce303" table:number-columns-repeated="10"/>
          <table:table-cell table:style-name="ce69" table:number-columns-repeated="1014"/>
        </table:table-row>
        <table:table-row table:style-name="ro29">
          <table:table-cell table:style-name="ce303" table:number-columns-repeated="5"/>
          <table:table-cell table:style-name="ce131" table:number-columns-spanned="3" table:number-rows-spanned="1"/>
          <table:covered-table-cell table:number-columns-repeated="2" table:style-name="ce303"/>
          <table:table-cell table:style-name="ce303" table:number-columns-repeated="2"/>
          <table:table-cell table:style-name="ce69" table:number-columns-repeated="1014"/>
        </table:table-row>
        <table:table-row table:style-name="ro2">
          <table:table-cell table:style-name="ce303" table:number-columns-repeated="4"/>
          <table:table-cell table:style-name="ce319" table:formula="of:=[calc.B7]" office:value-type="string" office:string-value="Patryk Pudwel" calcext:value-type="string" table:number-columns-spanned="6" table:number-rows-spanned="1">
            <text:p>Patryk Pudwel</text:p>
          </table:table-cell>
          <table:covered-table-cell table:style-name="ce319"/>
          <table:covered-table-cell table:number-columns-repeated="4"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3"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0"/>
        <table:table-column table:style-name="co35" table:default-cell-style-name="ce430"/>
        <table:table-column table:style-name="co36" table:default-cell-style-name="ce430"/>
        <table:table-column table:style-name="co16" table:number-columns-repeated="10" table:default-cell-style-name="ce430"/>
        <table:table-column table:style-name="co37" table:default-cell-style-name="ce430"/>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8/2019" calcext:value-type="string">
            <text:p>NR 01/08/2019</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9-08-08" calcext:value-type="date">
            <text:p>8.08.2019</text:p>
          </table:table-cell>
          <table:table-cell office:value-type="string" calcext:value-type="string">
            <text:p>Ostatni Roboczy</text:p>
          </table:table-cell>
          <table:table-cell table:style-name="ce220" table:formula="of:=IF([.F13]&lt;&gt;&quot;&quot;;[.F13];WORKDAY([.N3]+1;-1 ; ))" office:value-type="date" office:date-value="2019-08-30" calcext:value-type="date">
            <text:p>30.08.2019</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30.08.2019" calcext:value-type="string">
            <text:p>30.08.2019</text:p>
          </table:table-cell>
          <table:table-cell office:value-type="string" calcext:value-type="string">
            <text:p>Pierwszy</text:p>
          </table:table-cell>
          <table:table-cell table:style-name="ce236" table:formula="of:=TEXT([.N4];&quot;D.MM.YYYY&quot;)" office:value-type="string" office:string-value="1.08.2019" calcext:value-type="string">
            <text:p>1.08.2019</text:p>
          </table:table-cell>
          <table:table-cell office:value-type="string" calcext:value-type="string">
            <text:p>Ostatni</text:p>
          </table:table-cell>
          <table:table-cell table:style-name="ce236" table:formula="of:=IF([.F16]&lt;&gt;&quot;&quot;;[.F16];TEXT([.N3];&quot;DD.MM.YYYY&quot;))" office:value-type="string" office:string-value="31.08.2019" calcext:value-type="string">
            <text:p>31.08.2019</text:p>
          </table:table-cell>
          <table:table-cell office:value-type="string" calcext:value-type="string">
            <text:p>Umowa</text:p>
          </table:table-cell>
          <table:table-cell table:style-name="ce236" table:formula="of:=TEXT([.D13];&quot;DD.MM.YYYY&quot;)" office:value-type="string" office:string-value="06.05.2019" calcext:value-type="string">
            <text:p>06.05.2019</text:p>
          </table:table-cell>
          <table:table-cell table:number-columns-repeated="13"/>
          <table:table-cell table:formula="of:=CONCATENATE([.B12];&quot;h&quot;)" office:value-type="string" office:string-value="84h" calcext:value-type="string">
            <text:p>84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8/2019" calcext:value-type="string">
            <text:p>NR 01/08/2019</text:p>
          </table:table-cell>
          <table:table-cell table:formula="of:=REPLACE(REPLACE(REPLACE([.G1];7;2;[.L3]);10;4;[.L4]);4;2;[.B2])" office:value-type="string" office:string-value="NR 01/08/2019" calcext:value-type="string">
            <text:p>NR 01/08/2019</text:p>
          </table:table-cell>
          <table:table-cell/>
          <table:table-cell table:style-name="ce217"/>
          <table:table-cell table:number-columns-repeated="3"/>
          <table:table-cell office:value-type="string" calcext:value-type="string">
            <text:p>Miesiąc</text:p>
          </table:table-cell>
          <table:table-cell table:formula="of:=MONTH([.N3])" office:value-type="float" office:value="8" calcext:value-type="float">
            <text:p>8</text:p>
          </table:table-cell>
          <table:table-cell office:value-type="string" calcext:value-type="string">
            <text:p>Pierwszy</text:p>
          </table:table-cell>
          <table:table-cell table:style-name="ce220" table:formula="of:=EOMONTH([.N3];-1 )+1" office:value-type="date" office:date-value="2019-08-01" calcext:value-type="date">
            <text:p>1.08.2019</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8/30/2019" calcext:value-type="string">
            <text:p>08/30/2019</text:p>
          </table:table-cell>
          <table:table-cell/>
          <table:table-cell table:style-name="ce237" table:formula="of:=TEXT([.N4];&quot;MM/DD/YYYY&quot;)" office:value-type="string" office:string-value="08/01/2019" calcext:value-type="string">
            <text:p>08/01/2019</text:p>
          </table:table-cell>
          <table:table-cell/>
          <table:table-cell table:style-name="ce237" table:formula="of:=TEXT([.N3];&quot;MM/dd/YYYY&quot;)" office:value-type="string" office:string-value="08/31/2019" calcext:value-type="string">
            <text:p>08/31/2019</text:p>
          </table:table-cell>
          <table:table-cell/>
          <table:table-cell table:style-name="ce237" table:formula="of:=TEXT([.D13];&quot;MM/DD/YYYY&quot;)" office:value-type="string" office:string-value="05/06/2019" calcext:value-type="string">
            <text:p>05/06/2019</text:p>
          </table:table-cell>
          <table:table-cell table:number-columns-repeated="999"/>
        </table:table-row>
        <table:table-row table:style-name="ro12">
          <table:table-cell office:value-type="string" calcext:value-type="string">
            <text:p>Slownie</text:p>
          </table:table-cell>
          <table:table-cell table:style-name="ce348" table:formula="of:=REPLACE([.C4];[.H4];2;[.E4])" office:value-type="string" office:string-value="dwa tysiące dziewięćset pięćdziesiąt dwa złote zero gr." calcext:value-type="string" table:number-columns-spanned="3" table:number-rows-spanned="1">
            <text:p>dwa tysiące dziewięćset pięćdziesiąt dwa złote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8" calcext:value-type="string">
            <text:p>08</text:p>
          </table:table-cell>
          <table:table-cell office:value-type="string" calcext:value-type="string">
            <text:p>Ostatni</text:p>
          </table:table-cell>
          <table:table-cell table:style-name="ce220" table:formula="of:=EOMONTH([.L1];-[.B20] )" office:value-type="date" office:date-value="2019-08-31" calcext:value-type="date">
            <text:p>31.08.2019</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2952" calcext:value-type="float">
            <text:p>2952</text:p>
          </table:table-cell>
          <table:table-cell table:formula="of:=SLOWNIEZL([.B4])" office:value-type="string" office:string-value="dwa tysiące dziewięćset pięćdziesiąt dwa złote 0 gr." calcext:value-type="string">
            <text:p>dwa tysiące dziewięćset pięćdziesiąt dwa złote 0 gr.</text:p>
          </table:table-cell>
          <table:table-cell table:formula="of:=ROUND(([.B4]-INT([.B4]))*100)" office:value-type="float" office:value="0" calcext:value-type="float">
            <text:p>0</text:p>
          </table:table-cell>
          <table:table-cell table:style-name="ce348" table:formula="of:=SLOWNIE([.D4])" office:value-type="string" office:string-value="zero " calcext:value-type="string" table:number-columns-spanned="3" table:number-rows-spanned="1">
            <text:p>zero </text:p>
          </table:table-cell>
          <table:covered-table-cell table:style-name="ce348"/>
          <table:covered-table-cell/>
          <table:table-cell table:formula="of:=FIND([.D4];[.C4])" office:value-type="float" office:value="48" calcext:value-type="float">
            <text:p>48</text:p>
          </table:table-cell>
          <table:table-cell table:number-columns-repeated="2"/>
          <table:table-cell office:value-type="string" calcext:value-type="string">
            <text:p>Rok</text:p>
          </table:table-cell>
          <table:table-cell table:formula="of:=YEAR([.N1])" office:value-type="float" office:value="2019" calcext:value-type="float">
            <text:p>2019</text:p>
          </table:table-cell>
          <table:table-cell office:value-type="string" calcext:value-type="string">
            <text:p>Usługi od</text:p>
          </table:table-cell>
          <table:table-cell table:style-name="ce220" table:formula="of:=IF([.D8]=&quot;&quot;;[.N2];[.D8])" office:value-type="date" office:date-value="2019-08-01" calcext:value-type="date">
            <text:p>1.08.2019</text:p>
          </table:table-cell>
          <table:table-cell table:style-name="ce224"/>
          <table:table-cell table:number-columns-repeated="2"/>
          <table:table-cell table:style-name="ce348"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1" table:formula="of:=REPLACE([.R4];FIND(&quot;MMM&quot;;[.R4]);4;[.Q23])" office:value-type="string" office:string-value="Za świadczenie usług&#10;w m-cu sierpniu zgodnie&#10;z umową nr UUUU" calcext:value-type="string" table:number-columns-spanned="7" table:number-rows-spanned="1">
            <text:p>Za świadczenie usług</text:p>
            <text:p>w m-cu sierpniu zgodnie</text:p>
            <text:p>z umową nr UUUU</text:p>
          </table:table-cell>
          <table:covered-table-cell table:number-columns-repeated="6"/>
          <table:table-cell table:style-name="ce431" table:formula="of:=REPLACE([.X4];FIND(&quot;UUUU&quot;;[.X4]);4;NrUmowy)" office:value-type="string" office:string-value="Za świadczenie usług&#10;w m-cu sierpniu zgodnie&#10;z umową nr ISD19/1148" calcext:value-type="string" table:number-columns-spanned="7" table:number-rows-spanned="1">
            <text:p>Za świadczenie usług</text:p>
            <text:p>w m-cu sierpniu zgodnie</text:p>
            <text:p>z umową nr ISD19/1148</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1" table:formula="of:=REPLACE([.R5];FIND(&quot;MMM&quot;;[.R5]);4;[.Q23])" office:value-type="string" office:string-value=" oraz przeniesienie wszystkich autorskich praw majątkowych wraz&#10;z prawem do udzielenia zezwolenia&#10;na wykonywanie praw pokrewnych wynikających&#10;ze świadczenia usług&#10;w m-cu sierpni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sierpniu jak w umowie</text:p>
          </table:table-cell>
          <table:covered-table-cell table:style-name="ce431" table:formula="of:=REPLACE([.S5];FIND(&quot;MMM&quot;;[.S5]);4;INDIRECT(&quot;N&quot;&amp;[.M2]))" office:value-type="string" office:string-value="" calcext:value-type="error">
            <text:p>#VALUE!</text:p>
          </table:covered-table-cell>
          <table:covered-table-cell table:style-name="ce431" table:formula="of:=REPLACE([.T5];FIND(&quot;MMM&quot;;[.T5]);4;INDIRECT(&quot;N&quot;&amp;[.N2]))" office:value-type="string" office:string-value="" calcext:value-type="error">
            <text:p>#VALUE!</text:p>
          </table:covered-table-cell>
          <table:covered-table-cell table:style-name="ce431" table:formula="of:=REPLACE([.U5];FIND(&quot;MMM&quot;;[.U5]);4;INDIRECT(&quot;N&quot;&amp;[.Q12]))" office:value-type="string" office:string-value="" calcext:value-type="error">
            <text:p>#VALUE!</text:p>
          </table:covered-table-cell>
          <table:covered-table-cell table:style-name="ce431" table:formula="of:=REPLACE([.V5];FIND(&quot;MMM&quot;;[.V5]);4;INDIRECT(&quot;N&quot;&amp;[.P2]))" office:value-type="string" office:string-value="" calcext:value-type="error">
            <text:p>#VALUE!</text:p>
          </table:covered-table-cell>
          <table:covered-table-cell table:style-name="ce431" table:formula="of:=REPLACE([.W5];FIND(&quot;MMM&quot;;[.W5]);4;INDIRECT(&quot;N&quot;&amp;[.Q2]))" office:value-type="string" office:string-value="" calcext:value-type="error">
            <text:p>#VALUE!</text:p>
          </table:covered-table-cell>
          <table:covered-table-cell table:style-name="ce431" table:formula="of:=REPLACE([.X5];FIND(&quot;MMM&quot;;[.X5]);4;INDIRECT(&quot;N&quot;&amp;[.R2]))" office:value-type="string" office:string-value="" calcext:value-type="error">
            <text:p>#VALUE!</text:p>
          </table:covered-table-cell>
          <table:table-cell table:style-name="ce431" table:formula="of:=REPLACE([.X5];FIND(&quot;UUUU&quot;;[.X5]);4;NrUmowy)" office:value-type="string" office:string-value="" calcext:value-type="error" table:number-columns-spanned="7" table:number-rows-spanned="1">
            <text:p>#VALUE!</text:p>
          </table:table-cell>
          <table:covered-table-cell table:number-columns-repeated="6" table:style-name="ce431"/>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4"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office:value-type="string" calcext:value-type="string">
            <text:p>Patryk Pudwel</text:p>
          </table:table-cell>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Patryk Pudwel&#10;Sielankowa 18/1&#10;20-802 Lublin" calcext:value-type="string" table:number-columns-spanned="4" table:number-rows-spanned="4">
            <text:p>Patryk Pudwel</text:p>
            <text:p>Sielankowa 18/1</text:p>
            <text:p>20-802 Lublin</text:p>
          </table:table-cell>
          <table:covered-table-cell table:number-columns-repeated="3"/>
          <table:table-cell/>
          <table:table-cell table:style-name="ce348" table:formula="of:=CONCATENATE([.A11];[.B11])" office:value-type="string" office:string-value="NIP: 7123385604" calcext:value-type="string" table:number-columns-spanned="2" table:number-rows-spanned="1">
            <text:p>NIP: 7123385604</text:p>
          </table:table-cell>
          <table:covered-table-cell/>
          <table:table-cell/>
          <table:table-cell table:style-name="ce224"/>
          <table:table-cell table:number-columns-repeated="8"/>
          <table:table-cell table:style-name="ce432"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2"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2"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348"/>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LSE</text:p>
          </table:table-cell>
          <table:covered-table-cell/>
          <table:table-cell table:number-columns-repeated="7"/>
          <table:covered-table-cell table:style-name="ce432"/>
          <table:covered-table-cell table:number-columns-repeated="13"/>
          <table:table-cell/>
          <table:covered-table-cell table:style-name="ce432"/>
          <table:covered-table-cell table:number-columns-repeated="13"/>
          <table:table-cell/>
          <table:covered-table-cell table:style-name="ce432"/>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office:value-type="string" calcext:value-type="string">
            <text:p>Sielankowa</text:p>
          </table:table-cell>
          <table:table-cell table:style-name="ce181" office:value-type="string" calcext:value-type="string">
            <text:p>Nr: </text:p>
          </table:table-cell>
          <table:table-cell table:style-name="ce160" office:value-type="string" calcext:value-type="string">
            <text:p>18/1</text:p>
          </table:table-cell>
          <table:table-cell table:number-columns-repeated="2"/>
          <table:covered-table-cell table:number-columns-repeated="4"/>
          <table:table-cell/>
          <table:table-cell table:style-name="ce348" table:formula="of:=IF([.D11]=0;&quot;&quot;;CONCATENATE([.C11];[.D11]))" office:value-type="string" office:string-value="REGON: 383113428" calcext:value-type="string" table:number-columns-spanned="2" table:number-rows-spanned="1">
            <text:p>REGON: 383113428</text:p>
          </table:table-cell>
          <table:covered-table-cell/>
          <table:table-cell/>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office:value-type="string" calcext:value-type="string">
            <text:p>20-802</text:p>
          </table:table-cell>
          <table:table-cell table:style-name="ce181" office:value-type="string" calcext:value-type="string">
            <text:p>Poczta</text:p>
          </table:table-cell>
          <table:table-cell table:style-name="ce160" office:value-type="string" calcext:value-type="string">
            <text:p>Lublin</text:p>
          </table:table-cell>
          <table:table-cell table:number-columns-repeated="2"/>
          <table:covered-table-cell table:number-columns-repeated="4"/>
          <table:table-cell table:number-columns-repeated="4"/>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office:value-type="float" office:value="7123385604" calcext:value-type="float">
            <text:p>7123385604</text:p>
          </table:table-cell>
          <table:table-cell table:style-name="ce181" office:value-type="string" calcext:value-type="string">
            <text:p>REGON: </text:p>
          </table:table-cell>
          <table:table-cell table:style-name="ce191" office:value-type="float" office:value="383113428" calcext:value-type="float">
            <text:p>383113428</text:p>
          </table:table-cell>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office:value-type="float" office:value="84" calcext:value-type="float">
            <text:p>84</text:p>
          </table:table-cell>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office:value-type="float" office:value="2400" calcext:value-type="float">
            <text:p>2400</text:p>
          </table:table-cell>
          <table:table-cell table:style-name="ce143" office:value-type="string" calcext:value-type="string">
            <text:p>Data podpisania umowy</text:p>
          </table:table-cell>
          <table:table-cell table:style-name="ce193" office:value-type="date" office:date-value="2019-05-06" calcext:value-type="date">
            <text:p>6.05.2019</text:p>
          </table:table-cell>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2400" calcext:value-type="float">
            <text:p>240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office:value-type="string" calcext:value-type="string">
            <text:p>ISD19/1148</text:p>
          </table:table-cell>
          <table:covered-table-cell table:style-name="ce203"/>
          <table:covered-table-cell table:style-name="ce211"/>
          <table:table-cell table:style-name="ce221" table:formula="of:=IF(AND([.B$8]=&quot;&quot;;[.B$9]=&quot;&quot;);[.D10];&quot;&quot;)">
            <text:p/>
          </table:table-cell>
          <table:table-cell table:number-columns-repeated="2"/>
          <table:table-cell office:value-type="string" calcext:value-type="string">
            <text:p>wartość 1h</text:p>
          </table:table-cell>
          <table:table-cell table:formula="of:=IF([.D22]=&quot;&quot;;[.B13]/[.K12];[.D22])" office:value-type="float" office:value="13.846180473424" calcext:value-type="float">
            <text:p>13.846180473424</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office:value-type="string" calcext:value-type="string">
            <text:p>63 1140 2004 0000 3702 7842</text:p>
          </table:table-cell>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17"/>
          <table:table-cell office:value-type="string" calcext:value-type="string">
            <text:p>robocze w b.m</text:p>
          </table:table-cell>
          <table:table-cell table:formula="of:=NETWORKDAYS([.N2];[.N3])" office:value-type="float" office:value="22" calcext:value-type="float">
            <text:p>22</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office:value-type="string" office:string-value="Sielankowa" calcext:value-type="string">
            <text:p>Sielankowa</text:p>
          </table:table-cell>
          <table:table-cell table:style-name="ce224"/>
          <table:table-cell/>
          <table:table-cell office:value-type="string" calcext:value-type="string">
            <text:p>robocze</text:p>
          </table:table-cell>
          <table:table-cell table:formula="of:=IF([.D17];[.D17];[.K15])" office:value-type="float" office:value="22" calcext:value-type="float">
            <text:p>22</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4"/>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2400" calcext:value-type="float">
            <text:p>240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8.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8.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Sielankowa" calcext:value-type="string">
            <text:p>Sielankowa</text:p>
          </table:table-cell>
          <table:table-cell/>
          <table:table-cell table:formula="of:=IF([.D7]=&quot;&quot;;[.B7];[.D7])" office:value-type="string" office:string-value="Patryk Pudwel" calcext:value-type="string">
            <text:p>Patryk Pudwel</text:p>
          </table:table-cell>
          <table:table-cell office:value-type="string" calcext:value-type="string">
            <text:p>Licząc przepracowane</text:p>
          </table:table-cell>
          <table:table-cell table:formula="of:=ROUND([.K14]*([.K16]*8-[.K13]);2)" office:value-type="float" office:value="2436.93" calcext:value-type="float">
            <text:p>2436.93</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374"/>
          <table:table-cell table:number-columns-repeated="2"/>
          <table:table-cell table:formula="of:=IF([.B8]=&quot;&quot;;[.D10];[.B8])" office:value-type="string" office:string-value="Lublin" calcext:value-type="string">
            <text:p>Lublin</text:p>
          </table:table-cell>
          <table:table-cell table:number-columns-repeated="2"/>
          <table:table-cell office:value-type="string" calcext:value-type="string">
            <text:p>lepsze</text:p>
          </table:table-cell>
          <table:table-cell table:formula="of:=MAX([.K17];[.K18])" office:value-type="float" office:value="2436.93" calcext:value-type="float">
            <text:p>2436.93</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2)" calcext:value-type="string">
            <text:p>- z jakiś innych względów ten miesiąc ma inną liczbę dni roboczych niż 22)</text:p>
          </table:table-cell>
          <table:table-cell table:style-name="ce374"/>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1"/>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4" table:number-columns-repeated="10"/>
          <table:table-cell table:style-name="ce414" office:value-type="string" calcext:value-type="string">
            <text:p>grudniu</text:p>
          </table:table-cell>
          <table:table-cell table:style-name="ce414" table:number-columns-repeated="6"/>
          <table:covered-table-cell table:number-columns-repeated="14" table:style-name="ce434"/>
          <table:table-cell table:style-name="ce434"/>
          <table:covered-table-cell table:style-name="ce434"/>
          <table:covered-table-cell table:number-columns-repeated="13" table:style-name="ce414"/>
          <table:table-cell table:style-name="ce414" table:number-columns-repeated="972"/>
        </table:table-row>
        <table:table-row table:style-name="ro26">
          <table:table-cell table:style-name="ce341"/>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1"/>
          <table:covered-table-cell/>
          <table:table-cell table:style-name="ce399"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399"/>
          <table:covered-table-cell table:number-columns-repeated="3"/>
          <table:table-cell table:number-columns-repeated="7"/>
          <table:table-cell table:formula="of:=INDIRECT(&quot;Q&quot;&amp;[.L2]+10)" office:value-type="string" office:string-value="sierpniu"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1"/>
          <table:covered-table-cell table:style-name="ce172"/>
          <table:covered-table-cell table:style-name="ce341"/>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0"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0"/>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0" office:value-type="string" calcext:value-type="string" table:number-columns-spanned="8" table:number-rows-spanned="2">
            <text:p>Jeśli pola dalej są nieaktualne może pomóc odblokowanie i ponowne zablokowanie arkusza z formularzem.</text:p>
          </table:table-cell>
          <table:covered-table-cell table:style-name="ce400"/>
          <table:covered-table-cell table:number-columns-repeated="2"/>
          <table:covered-table-cell table:style-name="ce417"/>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1"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sierpniu." calcext:value-type="string">
            <text:p>Powyższe rozliczenie dotyczy HH godz. usług świadczonych w miesiącu sierpni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84 godz. usług świadczonych w miesiącu sierpniu." calcext:value-type="string">
            <text:p>Powyższe rozliczenie dotyczy 84 godz. usług świadczonych w miesiącu sierpni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1"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8.2019 a 31.08.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8/01/2019 and 08/31/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1"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8">00/00/0000</text:date>, <text:time style:data-style-name="N2" text:time-value="15:42:13.264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9T10:32:34.821000000</dc:date>
    <meta:editing-duration>P22DT7H8M7S</meta:editing-duration>
    <meta:editing-cycles>252</meta:editing-cycles>
    <meta:generator>LibreOffice/6.2.0.3$Windows_X86_64 LibreOffice_project/98c6a8a1c6c7b144ce3cc729e34964b47ce25d62</meta:generator>
    <meta:print-date>2018-05-23T08:43:28.459000000</meta:print-date>
    <meta:document-statistic meta:table-count="3" meta:cell-count="278"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